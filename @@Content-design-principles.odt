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358cm" table:align="left"/>
    </style:style>
    <style:style style:name="Table1.A" style:family="table-column">
      <style:table-column-properties style:column-width="9.22cm"/>
    </style:style>
    <style:style style:name="Table1.B" style:family="table-column">
      <style:table-column-properties style:column-width="3.13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f your aim is to design online teaching materials that students actually engage with and that improve learning outcomes, there are three particularly valuable areas to study:</text:p>
      <text:h text:style-name="Heading_20_2" text:outline-level="2">1. Multimedia Learning (Probably the most important)</text:h>
      <text:p text:style-name="Text_20_body">The work of Richard E. Mayer is widely regarded as the foundation for effective digital instructional design.</text:p>
      <text:p text:style-name="Text_20_body">His research identifies principles such as:</text:p>
      <text:list text:style-name="L1">
        <text:list-item>
          <text:p text:style-name="P1"><text:span text:style-name="Strong_20_Emphasis">Coherence Principle</text:span> – Remove decorative graphics, sounds and text that do not support learning.</text:p>
        </text:list-item>
        <text:list-item>
          <text:p text:style-name="P1"><text:span text:style-name="Strong_20_Emphasis">Signalling Principle</text:span> – Highlight important information with arrows, colour or emphasis.</text:p>
        </text:list-item>
        <text:list-item>
          <text:p text:style-name="P1"><text:span text:style-name="Strong_20_Emphasis">Redundancy Principle</text:span> – Avoid presenting identical information simultaneously as narration and large blocks of text.</text:p>
        </text:list-item>
        <text:list-item>
          <text:p text:style-name="P1"><text:span text:style-name="Strong_20_Emphasis">Segmenting Principle</text:span> – Break content into short, learner-controlled sections.</text:p>
        </text:list-item>
        <text:list-item>
          <text:p text:style-name="P1"><text:span text:style-name="Strong_20_Emphasis">Personalisation Principle</text:span> – Use conversational language.</text:p>
        </text:list-item>
        <text:list-item>
          <text:p text:style-name="P1"><text:span text:style-name="Strong_20_Emphasis">Modality Principle</text:span> – Spoken explanations with diagrams are often more effective than text-heavy slides.</text:p>
        </text:list-item>
      </text:list>
      <text:p text:style-name="Text_20_body">Recommended book:</text:p>
      <text:list text:style-name="L2">
        <text:list-item>
          <text:p text:style-name="P2">Multimedia Learning</text:p>
        </text:list-item>
      </text:list>
      <text:p text:style-name="Text_20_body">For a tutor producing videos, slides or interactive web pages, this is probably the best evidence-based starting point.</text:p>
      <text:p text:style-name="Horizontal_20_Line"/>
      <text:h text:style-name="Heading_20_2" text:outline-level="2">2. Cognitive Load Theory</text:h>
      <text:p text:style-name="Text_20_body">Developed principally by John Sweller.</text:p>
      <text:p text:style-name="Text_20_body">Key ideas:</text:p>
      <text:list text:style-name="L3">
        <text:list-item>
          <text:p text:style-name="P3">Working memory is limited.</text:p>
        </text:list-item>
        <text:list-item>
          <text:p text:style-name="P3">Materials should minimise unnecessary mental effort.</text:p>
        </text:list-item>
        <text:list-item>
          <text:p text:style-name="P3">Examples are often better than asking novices to solve difficult problems immediately.</text:p>
        </text:list-item>
        <text:list-item>
          <text:p text:style-name="P3">Gradually remove support as competence increases.</text:p>
        </text:list-item>
      </text:list>
      <text:p text:style-name="Text_20_body">Useful topics to search for:</text:p>
      <text:list text:style-name="L4">
        <text:list-item>
          <text:p text:style-name="P4">Worked examples</text:p>
        </text:list-item>
        <text:list-item>
          <text:p text:style-name="P4">Faded examples</text:p>
        </text:list-item>
        <text:list-item>
          <text:p text:style-name="P4">Split-attention effect</text:p>
        </text:list-item>
        <text:list-item>
          <text:p text:style-name="P4">Expertise reversal effect</text:p>
        </text:list-item>
      </text:list>
      <text:p text:style-name="Text_20_body"><text:soft-page-break/>Recommended book:</text:p>
      <text:list text:style-name="L5">
        <text:list-item>
          <text:p text:style-name="P5">Cognitive Load Theory</text:p>
        </text:list-item>
      </text:list>
      <text:p text:style-name="Horizontal_20_Line"/>
      <text:h text:style-name="Heading_20_2" text:outline-level="2">3. Evidence from Classroom Practice</text:h>
      <text:p text:style-name="Text_20_body">A highly respected source is:</text:p>
      <text:list text:style-name="L6">
        <text:list-item>
          <text:p text:style-name="P6">Education Endowment Foundation</text:p>
        </text:list-item>
      </text:list>
      <text:p text:style-name="Text_20_body">Their guidance reports discuss:</text:p>
      <text:list text:style-name="L7">
        <text:list-item>
          <text:p text:style-name="P7">Retrieval practice</text:p>
        </text:list-item>
        <text:list-item>
          <text:p text:style-name="P7">Feedback</text:p>
        </text:list-item>
        <text:list-item>
          <text:p text:style-name="P7">Metacognition</text:p>
        </text:list-item>
        <text:list-item>
          <text:p text:style-name="P7">Self-regulated learning</text:p>
        </text:list-item>
        <text:list-item>
          <text:p text:style-name="P7">Effective use of technology</text:p>
        </text:list-item>
      </text:list>
      <text:p text:style-name="Text_20_body">Particularly useful:</text:p>
      <text:list text:style-name="L8">
        <text:list-item>
          <text:p text:style-name="P8"><text:span text:style-name="Emphasis">Metacognition and Self-Regulated Learning Guidance Report</text:span></text:p>
        </text:list-item>
        <text:list-item>
          <text:p text:style-name="P8"><text:span text:style-name="Emphasis">Using Digital Technology to Improve Learning</text:span></text:p>
        </text:list-item>
      </text:list>
      <text:p text:style-name="Horizontal_20_Line"/>
      <text:h text:style-name="Heading_20_2" text:outline-level="2">4. MOOC and Online Course Design</text:h>
      <text:p text:style-name="Text_20_body">Studying successful online platforms can provide practical inspiration.</text:p>
      <text:p text:style-name="Text_20_body">Examples include:</text:p>
      <text:list text:style-name="L9">
        <text:list-item>
          <text:p text:style-name="P9">Khan Academy</text:p>
        </text:list-item>
        <text:list-item>
          <text:p text:style-name="P9">Coursera</text:p>
        </text:list-item>
        <text:list-item>
          <text:p text:style-name="P9">Brilliant</text:p>
        </text:list-item>
        <text:list-item>
          <text:p text:style-name="P9">Udemy</text:p>
        </text:list-item>
      </text:list>
      <text:p text:style-name="Text_20_body">Common features of effective courses:</text:p>
      <text:list text:style-name="L10">
        <text:list-item>
          <text:p text:style-name="P10">Videos under 6–10 minutes.</text:p>
        </text:list-item>
        <text:list-item>
          <text:p text:style-name="P10">Frequent low-stakes quizzes.</text:p>
        </text:list-item>
        <text:list-item>
          <text:p text:style-name="P10">Immediate feedback.</text:p>
        </text:list-item>
        <text:list-item>
          <text:p text:style-name="P10">Progress indicators.</text:p>
        </text:list-item>
        <text:list-item>
          <text:p text:style-name="P10">Consistent visual design.</text:p>
        </text:list-item>
        <text:list-item>
          <text:p text:style-name="P10">Interactive elements every few minutes.</text:p>
        </text:list-item>
        <text:list-item>
          <text:p text:style-name="P10">Downloadable summaries.</text:p>
        </text:list-item>
      </text:list>
      <text:p text:style-name="Horizontal_20_Line"><text:soft-page-break/></text:p>
      <text:h text:style-name="Heading_20_2" text:outline-level="2">5. Mathematics-Specific Resources</text:h>
      <text:p text:style-name="Text_20_body">Since you teach mathematics, these are particularly relevant.</text:p>
      <text:p text:style-name="Text_20_body">Study how the following present mathematics:</text:p>
      <text:list text:style-name="L11">
        <text:list-item>
          <text:p text:style-name="P11">Khan Academy</text:p>
        </text:list-item>
        <text:list-item>
          <text:p text:style-name="P11">Art of Problem Solving</text:p>
        </text:list-item>
        <text:list-item>
          <text:p text:style-name="P11">Desmos</text:p>
        </text:list-item>
        <text:list-item>
          <text:p text:style-name="P11">GeoGebra</text:p>
        </text:list-item>
      </text:list>
      <text:p text:style-name="Text_20_body">Notice that the best materials often:</text:p>
      <text:list text:style-name="L12">
        <text:list-item>
          <text:p text:style-name="P12">Reveal a diagram step-by-step.</text:p>
        </text:list-item>
        <text:list-item>
          <text:p text:style-name="P12">Ask students to predict outcomes before showing solutions.</text:p>
        </text:list-item>
        <text:list-item>
          <text:p text:style-name="P12">Use interactive graphs.</text:p>
        </text:list-item>
        <text:list-item>
          <text:p text:style-name="P12">Provide hints before complete solutions.</text:p>
        </text:list-item>
        <text:list-item>
          <text:p text:style-name="P12">Include short retrieval questions throughout.</text:p>
        </text:list-item>
      </text:list>
      <text:p text:style-name="Horizontal_20_Line"/>
      <text:h text:style-name="Heading_20_2" text:outline-level="2">6. A Practical Design Checklist</text:h>
      <text:p text:style-name="Text_20_body">Before publishing a lesson, ask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Question</text:p>
            </table:table-cell>
            <table:table-cell table:style-name="Table1.A1" office:value-type="string">
              <text:p text:style-name="Table_20_Heading">Desired Answer</text:p>
            </table:table-cell>
          </table:table-row>
        </table:table-header-rows>
        <table:table-row>
          <table:table-cell table:style-name="Table1.A1" office:value-type="string">
            <text:p text:style-name="Table_20_Contents">Can the main idea be understood in under 2 minutes?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Is every graphic serving a purpose?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Is there learner interaction every 3–5 minutes?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Is feedback immediate?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Can students control pacing?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Is the lesson mobile-friendly?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Is progress visible?</text:p>
          </table:table-cell>
          <table:table-cell table:style-name="Table1.A1" office:value-type="string">
            <text:p text:style-name="Table_20_Contents">Yes</text:p>
          </table:table-cell>
        </table:table-row>
      </table:table>
      <text:p text:style-name="Text_20_body">For a mathematics tutor creating premium online materials, the combination of <text:span text:style-name="Strong_20_Emphasis">Mayer's Multimedia Learning principles</text:span>, <text:span text:style-name="Strong_20_Emphasis">Cognitive Load Theory</text:span>, and <text:span text:style-name="Strong_20_Emphasis">interactive tools such as Desmos or GeoGebra</text:span> provides perhaps the strongest evidence-based foundation currently availa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18:49.667538200</meta:creation-date>
    <dc:date>2026-06-20T09:19:25.315747900</dc:date>
    <meta:editing-duration>PT36S</meta:editing-duration>
    <meta:editing-cycles>1</meta:editing-cycles>
    <meta:document-statistic meta:table-count="1" meta:image-count="0" meta:object-count="0" meta:page-count="3" meta:paragraph-count="86" meta:word-count="481" meta:character-count="3269" meta:non-whitespace-character-count="2914"/>
    <meta:generator>LibreOffice/26.2.1.2$Windows_X86_64 LibreOffice_project/620$Build-2</meta:generator>
  </office:meta>
</office:document-meta>
</file>